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manifest="urn:oasis:names:tc:opendocument:xmlns:manifest:1.0" xmlns:chart="urn:oasis:names:tc:opendocument:xmlns:chart:1.0" xmlns:table="urn:oasis:names:tc:opendocument:xmlns:table:1.0" office:version="1.2">
  <office:automatic-styles/>
  <office:body>
    <office:presentation>
      <draw:page draw:master-page-name="Master">
        <draw:frame presentation:style-name="Kicker" svg:width="31.27cm" svg:height="1cm" svg:x="1.3cm" svg:y="5.8cm">
          <draw:text-box>
            <text:p text:style-name="Kicker">TENDER PROPOSAL</text:p>
          </draw:text-box>
        </draw:frame>
        <draw:frame presentation:style-name="TitleBig" svg:width="31.27cm" svg:height="3cm" svg:x="1.3cm" svg:y="6.9cm">
          <draw:text-box>
            <text:p text:style-name="TitleBig">Urban Data</text:p>
          </draw:text-box>
        </draw:frame>
        <draw:frame presentation:style-name="Subtitle" svg:width="31.27cm" svg:height="2cm" svg:x="1.3cm" svg:y="9.8cm">
          <draw:text-box>
            <text:p text:style-name="Subtitle">An Ambient, Multi-Sensor Situational Awareness Platform for Cities</text:p>
          </draw:text-box>
        </draw:frame>
        <draw:frame presentation:style-name="Footer" svg:width="31.27cm" svg:height="0.6cm" svg:x="1.3cm" svg:y="18.3cm">
          <draw:text-box>
            <text:p text:style-name="Footer">Prepared for: [Issuing Authority]   |   Date: [Date]   |   Contact: [Name / Email]</text:p>
          </draw:text-box>
        </draw:frame>
      </draw:page>
      <draw:page draw:master-page-name="Master">
        <draw:frame presentation:style-name="Heading" svg:width="31.27cm" svg:height="1.6cm" svg:x="1.3cm" svg:y="1.1cm">
          <draw:text-box>
            <text:p text:style-name="Heading">The Problem</text:p>
          </draw:text-box>
        </draw:frame>
        <draw:frame presentation:style-name="Body" svg:width="31.27cm" svg:height="14.5cm" svg:x="1.3cm" svg:y="3.1cm">
          <draw:text-box>
            <text:list text:style-name="BulletList">
              <text:list-item>
                <text:p text:style-name="Body">Cities monitor incidents through disconnected, single-purpose systems — traffic cameras, 911 audio, seismic networks, RF spectrum monitors — that never talk to each other.</text:p>
              </text:list-item>
              <text:list-item>
                <text:p text:style-name="Body">Operators must manually correlate feeds across modalities under time pressure, which does not scale to city-wide, multi-domain events.</text:p>
              </text:list-item>
              <text:list-item>
                <text:p text:style-name="Body">Emerging risks — drone incursions, coordinated multi-site incidents, infrastructure attacks — require fusing signals across sensor types faster than manual triage allows.</text:p>
              </text:list-item>
              <text:list-item>
                <text:p text:style-name="Body">Existing situational-awareness products are typically single-modality, cloud-dependent, and vendor-locked — not built for edge deployment or open extension.</text:p>
              </text:list-item>
            </text:list>
          </draw:text-box>
        </draw:frame>
        <draw:frame presentation:style-name="Footer" svg:width="31.27cm" svg:height="0.6cm" svg:x="1.3cm" svg:y="18.3cm">
          <draw:text-box>
            <text:p text:style-name="Footer">Urban Data — Ambient Sensing Platform — Tender Proposal</text:p>
          </draw:text-box>
        </draw:frame>
      </draw:page>
      <draw:page draw:master-page-name="Master">
        <draw:frame presentation:style-name="Heading" svg:width="31.27cm" svg:height="1.6cm" svg:x="1.3cm" svg:y="1.1cm">
          <draw:text-box>
            <text:p text:style-name="Heading">The Solution</text:p>
          </draw:text-box>
        </draw:frame>
        <draw:frame presentation:style-name="Body" svg:width="31.27cm" svg:height="14.5cm" svg:x="1.3cm" svg:y="3.1cm">
          <draw:text-box>
            <text:list text:style-name="BulletList">
              <text:list-item>
                <text:p text:style-name="Body">Urban Data ingests five sensor modalities — photo, video, audio, RF, and seismic — into one fusion pipeline.</text:p>
              </text:list-item>
              <text:list-item>
                <text:p text:style-name="Body">Related signals across modalities are automatically grouped into a single incident, rather than left as isolated alerts.</text:p>
              </text:list-item>
              <text:list-item>
                <text:p text:style-name="Body">Each incident is resolved into three explainable outputs:</text:p>
              </text:list-item>
              <text:list-item>
                <text:p text:style-name="Body"/>
                <text:list text:style-name="BulletList">
                  <text:list-item>
                    <text:p text:style-name="Body">Main Event — what is confirmed to be happening</text:p>
                  </text:list-item>
                  <text:list-item>
                    <text:p text:style-name="Body">Prediction — what is likely to happen next</text:p>
                  </text:list-item>
                  <text:list-item>
                    <text:p text:style-name="Body">Suggestion — recommended operator action</text:p>
                  </text:list-item>
                </text:list>
              </text:list-item>
              <text:list-item>
                <text:p text:style-name="Body">Built so every “fake” demo module (analysis logic, agent reasoning) is a clean drop-in point for production ML — the architecture doesn't change post-funding, only what's behind each block.</text:p>
              </text:list-item>
            </text:list>
          </draw:text-box>
        </draw:frame>
        <draw:frame presentation:style-name="Footer" svg:width="31.27cm" svg:height="0.6cm" svg:x="1.3cm" svg:y="18.3cm">
          <draw:text-box>
            <text:p text:style-name="Footer">Urban Data — Ambient Sensing Platform — Tender Proposal</text:p>
          </draw:text-box>
        </draw:frame>
      </draw:page>
      <draw:page draw:master-page-name="Master">
        <draw:frame presentation:style-name="Heading" svg:width="31.27cm" svg:height="1.6cm" svg:x="1.3cm" svg:y="1.1cm">
          <draw:text-box>
            <text:p text:style-name="Heading">System Architecture</text:p>
          </draw:text-box>
        </draw:frame>
        <draw:frame presentation:style-name="Mono" svg:width="31.27cm" svg:height="14.5cm" svg:x="1.3cm" svg:y="3.1cm">
          <draw:text-box>
            <text:p text:style-name="Mono">  Sensor Sources            AI Source        AI Events         Operator UI</text:p>
            <text:p text:style-name="Mono">  (photo/video/audio/  ---&gt; Analyzer   ---&gt;  Processor   ---&gt; (map, event feed,</text:p>
            <text:p text:style-name="Mono">   RF/seismic)               (per-source        (cross-source     agents panel)</text:p>
            <text:p text:style-name="Mono">                              classify)          correlation)</text:p>
            <text:p text:style-name="Mono"/>
            <text:p text:style-name="Mono">  Demo mode:      a Scenario Controller feeds the pipeline over ZMQ.</text:p>
            <text:p text:style-name="Mono">  Production mode: real hardware sources replace the Scenario Controller —</text:p>
            <text:p text:style-name="Mono">                    the rest of the pipeline and the UI are unchanged.</text:p>
            <text:p text:style-name="Mono"/>
            <text:p text:style-name="Mono">  Built on GNU Radio (GRC) — an industry-standard, modular DSP / message-</text:p>
            <text:p text:style-name="Mono">  passing framework — so the flowgraph itself is a visible, inspectable</text:p>
            <text:p text:style-name="Mono">  proof of the architecture, not just a slide diagram.</text:p>
          </draw:text-box>
        </draw:frame>
        <draw:frame presentation:style-name="Footer" svg:width="31.27cm" svg:height="0.6cm" svg:x="1.3cm" svg:y="18.3cm">
          <draw:text-box>
            <text:p text:style-name="Footer">Urban Data — Ambient Sensing Platform — Tender Proposal</text:p>
          </draw:text-box>
        </draw:frame>
      </draw:page>
      <draw:page draw:master-page-name="Master">
        <draw:frame presentation:style-name="Heading" svg:width="31.27cm" svg:height="1.6cm" svg:x="1.3cm" svg:y="1.1cm">
          <draw:text-box>
            <text:p text:style-name="Heading">Multi-Modal Sensor Fusion</text:p>
          </draw:text-box>
        </draw:frame>
        <draw:frame presentation:style-name="Body" svg:width="31.27cm" svg:height="14.5cm" svg:x="1.3cm" svg:y="3.1cm">
          <draw:text-box>
            <text:list text:style-name="BulletList">
              <text:list-item>
                <text:p text:style-name="Body">Photo / Video — visual confirmation</text:p>
                <text:list text:style-name="BulletList">
                  <text:list-item>
                    <text:p text:style-name="Body">drones, vehicles, crowds, infrastructure damage</text:p>
                  </text:list-item>
                </text:list>
              </text:list-item>
              <text:list-item>
                <text:p text:style-name="Body">Audio — acoustic signatures</text:p>
                <text:list text:style-name="BulletList">
                  <text:list-item>
                    <text:p text:style-name="Body">engines, explosions, gunshots, distress calls</text:p>
                  </text:list-item>
                </text:list>
              </text:list-item>
              <text:list-item>
                <text:p text:style-name="Body">RF / FFT — radio-spectrum detection</text:p>
                <text:list text:style-name="BulletList">
                  <text:list-item>
                    <text:p text:style-name="Body">drone control links, jamming, unregistered transmitters</text:p>
                  </text:list-item>
                </text:list>
              </text:list-item>
              <text:list-item>
                <text:p text:style-name="Body">Seismic — ground-vibration sensing</text:p>
                <text:list text:style-name="BulletList">
                  <text:list-item>
                    <text:p text:style-name="Body">vehicle convoys, impacts, structural events</text:p>
                  </text:list-item>
                </text:list>
              </text:list-item>
              <text:list-item>
                <text:p text:style-name="Body">Each modality detects independently; the Events Processor raises confidence and reduces false positives by requiring corroboration across modalities before escalating an incident.</text:p>
              </text:list-item>
            </text:list>
          </draw:text-box>
        </draw:frame>
        <draw:frame presentation:style-name="Footer" svg:width="31.27cm" svg:height="0.6cm" svg:x="1.3cm" svg:y="18.3cm">
          <draw:text-box>
            <text:p text:style-name="Footer">Urban Data — Ambient Sensing Platform — Tender Proposal</text:p>
          </draw:text-box>
        </draw:frame>
      </draw:page>
      <draw:page draw:master-page-name="Master">
        <draw:frame presentation:style-name="Heading" svg:width="31.27cm" svg:height="1.6cm" svg:x="1.3cm" svg:y="1.1cm">
          <draw:text-box>
            <text:p text:style-name="Heading">Explainable, Auditable Reasoning</text:p>
          </draw:text-box>
        </draw:frame>
        <draw:frame presentation:style-name="Body" svg:width="31.27cm" svg:height="14.5cm" svg:x="1.3cm" svg:y="3.1cm">
          <draw:text-box>
            <text:list text:style-name="BulletList">
              <text:list-item>
                <text:p text:style-name="Body">Every incident-level conclusion (Main Event / Prediction / Suggestion) is traceable back to the specific source events that produced it — not a black-box score.</text:p>
              </text:list-item>
              <text:list-item>
                <text:p text:style-name="Body">Roadmap: one independently-reasoning AI agent per active incident, briefed automatically the moment an incident is confirmed.</text:p>
              </text:list-item>
              <text:list-item>
                <text:p text:style-name="Body">Agent actions are exposed through a constrained tool-calling surface (dispatch a unit, issue an alert, lock a zone) — human operators stay in the loop for every action taken.</text:p>
              </text:list-item>
              <text:list-item>
                <text:p text:style-name="Body">Operators can chat directly with an incident's agent to question or override its reasoning before any action is taken.</text:p>
              </text:list-item>
            </text:list>
          </draw:text-box>
        </draw:frame>
        <draw:frame presentation:style-name="Footer" svg:width="31.27cm" svg:height="0.6cm" svg:x="1.3cm" svg:y="18.3cm">
          <draw:text-box>
            <text:p text:style-name="Footer">Urban Data — Ambient Sensing Platform — Tender Proposal</text:p>
          </draw:text-box>
        </draw:frame>
      </draw:page>
      <draw:page draw:master-page-name="Master">
        <draw:frame presentation:style-name="Heading" svg:width="31.27cm" svg:height="1.6cm" svg:x="1.3cm" svg:y="1.1cm">
          <draw:text-box>
            <text:p text:style-name="Heading">Demonstrated Scenarios</text:p>
          </draw:text-box>
        </draw:frame>
        <draw:frame presentation:style-name="Mono" svg:width="31.27cm" svg:height="14.5cm" svg:x="1.3cm" svg:y="3.1cm">
          <draw:text-box>
            <text:p text:style-name="Mono">Scenario                   Events     Content                                                      </text:p>
            <text:p text:style-name="Mono">-------------------------  ---------  -----------------------------------------------------------  </text:p>
            <text:p text:style-name="Mono">Everyday Baseline          8 (loop)   Nothing-happening baseline across Toronto/Ottawa/Vancouver   </text:p>
            <text:p text:style-name="Mono">Small Events               15         Traffic stop, crash, ambulance, street fight, gas leak       </text:p>
            <text:p text:style-name="Mono">Flood                      20         River flooding, water rescue, citizen radio reports          </text:p>
            <text:p text:style-name="Mono">Coordinated Civil Unrest   17         Simultaneous multi-city riots, pattern correlation           </text:p>
            <text:p text:style-name="Mono">Full-Scale Invasion        45+        Drone swarm to armored columns to urban incursion            </text:p>
          </draw:text-box>
        </draw:frame>
        <draw:frame presentation:style-name="Footer" svg:width="31.27cm" svg:height="0.6cm" svg:x="1.3cm" svg:y="18.3cm">
          <draw:text-box>
            <text:p text:style-name="Footer">Urban Data — Ambient Sensing Platform — Tender Proposal  —  demonstrates scaling from routine monitoring to major multi-domain crisis</text:p>
          </draw:text-box>
        </draw:frame>
      </draw:page>
      <draw:page draw:master-page-name="Master">
        <draw:frame presentation:style-name="Heading" svg:width="31.27cm" svg:height="1.6cm" svg:x="1.3cm" svg:y="1.1cm">
          <draw:text-box>
            <text:p text:style-name="Heading">Privacy by Design</text:p>
          </draw:text-box>
        </draw:frame>
        <draw:frame presentation:style-name="Body" svg:width="31.27cm" svg:height="14.5cm" svg:x="1.3cm" svg:y="3.1cm">
          <draw:text-box>
            <text:list text:style-name="BulletList">
              <text:list-item>
                <text:p text:style-name="Body">Every source asset passes through a real (not simulated) face and license-plate anonymization stage before entering the pipeline.</text:p>
              </text:list-item>
              <text:list-item>
                <text:p text:style-name="Body">This is the one pipeline stage that is genuinely production-grade in the current build — privacy protection was treated as a first-class requirement, not an afterthought bolted on later.</text:p>
              </text:list-item>
              <text:list-item>
                <text:p text:style-name="Body">Downstream analysis, storage, and the operator UI only ever see anonymized media.</text:p>
              </text:list-item>
            </text:list>
          </draw:text-box>
        </draw:frame>
        <draw:frame presentation:style-name="Footer" svg:width="31.27cm" svg:height="0.6cm" svg:x="1.3cm" svg:y="18.3cm">
          <draw:text-box>
            <text:p text:style-name="Footer">Urban Data — Ambient Sensing Platform — Tender Proposal</text:p>
          </draw:text-box>
        </draw:frame>
      </draw:page>
      <draw:page draw:master-page-name="Master">
        <draw:frame presentation:style-name="Heading" svg:width="31.27cm" svg:height="1.6cm" svg:x="1.3cm" svg:y="1.1cm">
          <draw:text-box>
            <text:p text:style-name="Heading">Edge Deployability</text:p>
          </draw:text-box>
        </draw:frame>
        <draw:frame presentation:style-name="Body" svg:width="31.27cm" svg:height="14.5cm" svg:x="1.3cm" svg:y="3.1cm">
          <draw:text-box>
            <text:list text:style-name="BulletList">
              <text:list-item>
                <text:p text:style-name="Body">Target hardware: NVIDIA Jetson Orin Nano / Xavier / Orin NX — field-portable, no continuous cloud dependency for core detection.</text:p>
              </text:list-item>
              <text:list-item>
                <text:p text:style-name="Body">Sensor-to-decision pipeline runs locally; only optional higher-level services (e.g. LLM reasoning) need network access, and even that can be swapped for a local model.</text:p>
              </text:list-item>
              <text:list-item>
                <text:p text:style-name="Body">Directly addresses distributed, field-deployable, low-connectivity requirements for municipal and public-safety infrastructure.</text:p>
              </text:list-item>
            </text:list>
          </draw:text-box>
        </draw:frame>
        <draw:frame presentation:style-name="Footer" svg:width="31.27cm" svg:height="0.6cm" svg:x="1.3cm" svg:y="18.3cm">
          <draw:text-box>
            <text:p text:style-name="Footer">Urban Data — Ambient Sensing Platform — Tender Proposal</text:p>
          </draw:text-box>
        </draw:frame>
      </draw:page>
      <draw:page draw:master-page-name="Master">
        <draw:frame presentation:style-name="Heading" svg:width="31.27cm" svg:height="1.6cm" svg:x="1.3cm" svg:y="1.1cm">
          <draw:text-box>
            <text:p text:style-name="Heading">Development Status</text:p>
          </draw:text-box>
        </draw:frame>
        <draw:frame presentation:style-name="Mono" svg:width="31.27cm" svg:height="14.5cm" svg:x="1.3cm" svg:y="3.1cm">
          <draw:text-box>
            <text:p text:style-name="Mono">Step                      Status        Output                                      </text:p>
            <text:p text:style-name="Mono">------------------------  ------------  ------------------------------------------  </text:p>
            <text:p text:style-name="Mono">1. Scenario data model    Done          scenarios/ — multi-scenario event library   </text:p>
            <text:p text:style-name="Mono">1.1 Scenario Controller   Done          Playback engine + live ZMQ feed             </text:p>
            <text:p text:style-name="Mono">2. AI Source Analyzer     Logic done    Per-source classification                   </text:p>
            <text:p text:style-name="Mono">3. AI Events Processor    Logic done    Cross-source correlation                    </text:p>
            <text:p text:style-name="Mono">4. Operator UI            In progress   Map, event feed, agents panel               </text:p>
            <text:p text:style-name="Mono">5. Media assets           In progress   Real + generated sensor media               </text:p>
            <text:p text:style-name="Mono">6. Live agents + MCP      Planned       Real LLM reasoning per incident             </text:p>
          </draw:text-box>
        </draw:frame>
        <draw:frame presentation:style-name="Footer" svg:width="31.27cm" svg:height="0.6cm" svg:x="1.3cm" svg:y="18.3cm">
          <draw:text-box>
            <text:p text:style-name="Footer">Urban Data — Ambient Sensing Platform — Tender Proposal</text:p>
          </draw:text-box>
        </draw:frame>
      </draw:page>
      <draw:page draw:master-page-name="Master">
        <draw:frame presentation:style-name="Heading" svg:width="31.27cm" svg:height="1.6cm" svg:x="1.3cm" svg:y="1.1cm">
          <draw:text-box>
            <text:p text:style-name="Heading">Why Urban Data</text:p>
          </draw:text-box>
        </draw:frame>
        <draw:frame presentation:style-name="Body" svg:width="31.27cm" svg:height="14.5cm" svg:x="1.3cm" svg:y="3.1cm">
          <draw:text-box>
            <text:list text:style-name="BulletList">
              <text:list-item>
                <text:p text:style-name="Body">Multi-domain fusion, where most alternatives are single-sensor.</text:p>
              </text:list-item>
              <text:list-item>
                <text:p text:style-name="Body">Explainable and auditable at every level — conclusions trace back to source evidence.</text:p>
              </text:list-item>
              <text:list-item>
                <text:p text:style-name="Body">Modular by construction: production ML slots into the same architecture already proven in this build, with no rework.</text:p>
              </text:list-item>
              <text:list-item>
                <text:p text:style-name="Body">Edge-ready from day one, not retrofitted for offline use later.</text:p>
              </text:list-item>
              <text:list-item>
                <text:p text:style-name="Body">Privacy safeguards built into the pipeline itself, ahead of the analysis stage.</text:p>
              </text:list-item>
            </text:list>
          </draw:text-box>
        </draw:frame>
        <draw:frame presentation:style-name="Footer" svg:width="31.27cm" svg:height="0.6cm" svg:x="1.3cm" svg:y="18.3cm">
          <draw:text-box>
            <text:p text:style-name="Footer">Urban Data — Ambient Sensing Platform — Tender Proposal</text:p>
          </draw:text-box>
        </draw:frame>
      </draw:page>
      <draw:page draw:master-page-name="Master">
        <draw:frame presentation:style-name="Heading" svg:width="31.27cm" svg:height="1.6cm" svg:x="1.3cm" svg:y="1.1cm">
          <draw:text-box>
            <text:p text:style-name="Heading">Proposal &amp; Next Steps</text:p>
          </draw:text-box>
        </draw:frame>
        <draw:frame presentation:style-name="Body" svg:width="31.27cm" svg:height="14.5cm" svg:x="1.3cm" svg:y="3.1cm">
          <draw:text-box>
            <text:list text:style-name="BulletList">
              <text:list-item>
                <text:p text:style-name="Body">Requesting funding to complete Phase 2 (full real + synthetic media integration across all sensor modalities) and Phase 3 (live per-incident AI agents, MCP tool integration, field pilot).</text:p>
              </text:list-item>
              <text:list-item>
                <text:p text:style-name="Body">Proposed timeline: [Timeline]</text:p>
              </text:list-item>
              <text:list-item>
                <text:p text:style-name="Body">Proposed budget: [Budget]</text:p>
              </text:list-item>
              <text:list-item>
                <text:p text:style-name="Body">Deliverable: a field-deployable pilot system ready for evaluation on live municipal sensor feeds.</text:p>
              </text:list-item>
            </text:list>
          </draw:text-box>
        </draw:frame>
        <draw:frame presentation:style-name="Footer" svg:width="31.27cm" svg:height="0.6cm" svg:x="1.3cm" svg:y="18.3cm">
          <draw:text-box>
            <text:p text:style-name="Footer">Urban Data — Ambient Sensing Platform — Tender Proposal</text:p>
          </draw:text-box>
        </draw:frame>
      </draw:page>
      <draw:page draw:master-page-name="Master">
        <draw:frame presentation:style-name="Kicker" svg:width="31.27cm" svg:height="1cm" svg:x="1.3cm" svg:y="5.8cm">
          <draw:text-box>
            <text:p text:style-name="Kicker">THANK YOU</text:p>
          </draw:text-box>
        </draw:frame>
        <draw:frame presentation:style-name="TitleBig" svg:width="31.27cm" svg:height="3cm" svg:x="1.3cm" svg:y="6.9cm">
          <draw:text-box>
            <text:p text:style-name="TitleBig">Questions &amp; Discussion</text:p>
          </draw:text-box>
        </draw:frame>
        <draw:frame presentation:style-name="Subtitle" svg:width="31.27cm" svg:height="2cm" svg:x="1.3cm" svg:y="9.8cm">
          <draw:text-box>
            <text:p text:style-name="Subtitle">[Name]  —  [Email]  —  [Phone]</text:p>
          </draw:text-box>
        </draw:frame>
        <draw:frame presentation:style-name="Footer" svg:width="31.27cm" svg:height="0.6cm" svg:x="1.3cm" svg:y="18.3cm">
          <draw:text-box>
            <text:p text:style-name="Footer">Urban Data — Ambient Sensing Platform — Tender Proposal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manifest="urn:oasis:names:tc:opendocument:xmlns:manifest:1.0" office:version="1.2">
  <office:styles>
    <style:style style:name="Kicker" style:family="presentation" style:display-name="Kicker">
      <style:graphic-properties draw:fill="none" draw:stroke="none"/>
      <style:paragraph-properties/>
      <style:text-properties fo:font-size="16pt" fo:font-weight="bold" fo:color="#1f4e79" fo:font-family="Calibri"/>
    </style:style>
    <style:style style:name="TitleBig" style:family="presentation" style:display-name="TitleBig">
      <style:graphic-properties draw:fill="none" draw:stroke="none"/>
      <style:paragraph-properties/>
      <style:text-properties fo:font-size="40pt" fo:font-weight="bold" fo:color="#1a1a1a" fo:font-family="Calibri"/>
    </style:style>
    <style:style style:name="Subtitle" style:family="presentation" style:display-name="Subtitle">
      <style:graphic-properties draw:fill="none" draw:stroke="none"/>
      <style:paragraph-properties/>
      <style:text-properties fo:font-size="20pt" fo:font-weight="normal" fo:color="#555555" fo:font-family="Calibri"/>
    </style:style>
    <style:style style:name="Heading" style:family="presentation" style:display-name="Heading">
      <style:graphic-properties draw:fill="none" draw:stroke="none"/>
      <style:paragraph-properties/>
      <style:text-properties fo:font-size="28pt" fo:font-weight="bold" fo:color="#1f4e79" fo:font-family="Calibri"/>
    </style:style>
    <style:style style:name="Body" style:family="presentation" style:display-name="Body">
      <style:graphic-properties draw:fill="none" draw:stroke="none"/>
      <style:paragraph-properties/>
      <style:text-properties fo:font-size="18pt" fo:font-weight="normal" fo:color="#1a1a1a" fo:font-family="Calibri"/>
    </style:style>
    <style:style style:name="Mono" style:family="presentation" style:display-name="Mono">
      <style:graphic-properties draw:fill="none" draw:stroke="none"/>
      <style:paragraph-properties/>
      <style:text-properties fo:font-size="14pt" fo:font-weight="normal" fo:color="#1a1a1a" fo:font-family="Consolas"/>
    </style:style>
    <style:style style:name="Footer" style:family="presentation" style:display-name="Footer">
      <style:graphic-properties draw:fill="none" draw:stroke="none"/>
      <style:paragraph-properties/>
      <style:text-properties fo:font-size="11pt" fo:font-weight="normal" fo:color="#555555" fo:font-family="Calibri"/>
    </style:style>
    <text:list-style style:name="BulletList" style:display-name="BulletList">
      <text:list-level-style-bullet text:level="1" text:bullet-char="•">
        <style:list-level-properties text:space-before="0.6cm" text:min-label-width="0.6cm"/>
      </text:list-level-style-bullet>
      <text:list-level-style-bullet text:level="2" text:bullet-char="–">
        <style:list-level-properties text:space-before="1.2cm" text:min-label-width="0.6cm"/>
      </text:list-level-style-bullet>
      <text:list-level-style-bullet text:level="3" text:bullet-char="–">
        <style:list-level-properties text:space-before="1.7999999999999998cm" text:min-label-width="0.6cm"/>
      </text:list-level-style-bullet>
    </text:list-style>
  </office:styles>
  <office:automatic-styles>
    <style:page-layout style:name="Layout">
      <style:page-layout-properties fo:margin="0cm" fo:page-width="33.87cm" fo:page-height="19.05cm" style:print-orientation="landscape"/>
    </style:page-layout>
  </office:automatic-styles>
  <office:master-styles>
    <style:master-page style:name="Master" style:page-layout-name="Layout" style:display-name="Master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